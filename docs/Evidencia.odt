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70000025403EFE038.png" manifest:media-type="image/png"/>
  <manifest:file-entry manifest:full-path="Pictures/10000001000002CB000002254F01D463.png" manifest:media-type="image/png"/>
  <manifest:file-entry manifest:full-path="Pictures/10000001000002CB0000022572DDCCAB.png" manifest:media-type="image/png"/>
  <manifest:file-entry manifest:full-path="Pictures/10000001000002CB0000022530F90D8F.png" manifest:media-type="image/png"/>
  <manifest:file-entry manifest:full-path="Pictures/10000001000002CB00000214A6B9941B.png" manifest:media-type="image/png"/>
  <manifest:file-entry manifest:full-path="Pictures/10000001000002CB000001F9960211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618" officeooo:paragraph-rsid="0015f618"/>
    </style:style>
    <style:style style:name="P2" style:family="paragraph" style:parent-style-name="Standard">
      <style:text-properties officeooo:rsid="001e59f0" officeooo:paragraph-rsid="001e59f0"/>
    </style:style>
    <style:style style:name="P3" style:family="paragraph" style:parent-style-name="Standard">
      <style:text-properties officeooo:rsid="00161885" officeooo:paragraph-rsid="00161885"/>
    </style:style>
    <style:style style:name="P4" style:family="paragraph" style:parent-style-name="Standard">
      <style:paragraph-properties fo:break-before="page"/>
      <style:text-properties officeooo:rsid="00161885" officeooo:paragraph-rsid="00161885"/>
    </style:style>
    <style:style style:name="P5" style:family="paragraph" style:parent-style-name="Standard">
      <style:paragraph-properties fo:break-before="page"/>
      <style:text-properties officeooo:rsid="00173efc" officeooo:paragraph-rsid="00173efc"/>
    </style:style>
    <style:style style:name="P6" style:family="paragraph" style:parent-style-name="Standard">
      <style:text-properties officeooo:rsid="00173efc" officeooo:paragraph-rsid="00173efc"/>
    </style:style>
    <style:style style:name="P7" style:family="paragraph" style:parent-style-name="Standard">
      <style:paragraph-properties fo:text-align="center" style:justify-single-word="false" fo:break-before="page"/>
      <style:text-properties fo:font-size="14pt" officeooo:rsid="001abff1" officeooo:paragraph-rsid="001abff1" style:font-size-asian="14pt" style:font-size-complex="14pt"/>
    </style:style>
    <style:style style:name="P8" style:family="paragraph" style:parent-style-name="Standard">
      <style:text-properties officeooo:rsid="001abff1" officeooo:paragraph-rsid="001abff1"/>
    </style:style>
    <style:style style:name="P9" style:family="paragraph" style:parent-style-name="Standard">
      <style:paragraph-properties fo:break-before="page"/>
      <style:text-properties officeooo:rsid="001abff1" officeooo:paragraph-rsid="001abff1"/>
    </style:style>
    <style:style style:name="T1" style:family="text">
      <style:text-properties officeooo:rsid="001db32e"/>
    </style:style>
    <style:style style:name="fr1" style:family="graphic" style:parent-style-name="Graphics">
      <style:graphic-properties fo:margin-top="0.199cm" fo:margin-bottom="0.1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fo:margin-top="0.199cm" fo:margin-bottom="0.1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fo:margin-top="0.199cm" fo:margin-bottom="0.199cm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fo:margin-top="0.199cm" fo:margin-bottom="0.199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RL del Proyecto: https://github.com/LuisAyala/cowork-api.git</text:p>
      <text:p text:style-name="P1"/>
      <text:p text:style-name="P1">Metadata de la App</text:p>
      <text:p text:style-name="P1"/>
      <text:p text:style-name="P1"><draw:frame draw:style-name="fr1" draw:name="Imagen1" text:anchor-type="paragraph" svg:x="0cm" svg:y="0.078cm" svg:width="17cm" svg:height="12.007cm" draw:z-index="0"><draw:image xlink:href="Pictures/10000001000002CB000001F996021163.png" xlink:type="simple" xlink:show="embed" xlink:actuate="onLoad" draw:mime-type="image/png"/></draw:frame></text:p>
      <text:p text:style-name="P3"/>
      <text:p text:style-name="P4">Crear una sala:</text:p>
      <text:p text:style-name="P3"><draw:frame draw:style-name="fr1" draw:name="Imagen2" text:anchor-type="paragraph" svg:x="-0.37cm" svg:y="0.753cm" svg:width="17cm" svg:height="12.649cm" draw:z-index="1"><draw:image xlink:href="Pictures/10000001000002CB00000214A6B9941B.png" xlink:type="simple" xlink:show="embed" xlink:actuate="onLoad" draw:mime-type="image/png"/></draw:frame></text:p>
      <text:p text:style-name="P5">Crear Reserva:</text:p>
      <text:p text:style-name="P6"><draw:frame draw:style-name="fr2" draw:name="Imagen3" text:anchor-type="char" svg:x="0cm" svg:y="1.169cm" svg:width="17cm" svg:height="13.053cm" draw:z-index="2"><draw:image xlink:href="Pictures/10000001000002CB0000022530F90D8F.png" xlink:type="simple" xlink:show="embed" xlink:actuate="onLoad" draw:mime-type="image/png"/></draw:frame></text:p>
      <text:p text:style-name="P6"/>
      <text:p text:style-name="P5">Cambiar el Estado de la Reserva</text:p>
      <text:p text:style-name="P6"><draw:frame draw:style-name="fr2" draw:name="Imagen4" text:anchor-type="char" svg:x="-0.529cm" svg:y="1.381cm" svg:width="17cm" svg:height="13.053cm" draw:z-index="3"><draw:image xlink:href="Pictures/10000001000002CB0000022572DDCCAB.png" xlink:type="simple" xlink:show="embed" xlink:actuate="onLoad" draw:mime-type="image/png"/></draw:frame></text:p>
      <text:p text:style-name="P7">Evidencia de validaciones internas</text:p>
      <text:p text:style-name="P8"/>
      <text:p text:style-name="P8">valores no permitidos o ajenos a : <text:span text:style-name="Source_20_Text">PENDIENTE</text:span>, <text:span text:style-name="Source_20_Text">CONFIRMADA</text:span>, <text:span text:style-name="Source_20_Text">CANCELADA</text:span></text:p>
      <text:p text:style-name="P8"><draw:frame draw:style-name="fr3" draw:name="Imagen5" text:anchor-type="paragraph" svg:x="1.72cm" svg:y="4.399cm" svg:width="17cm" svg:height="13.053cm" draw:z-index="4"><draw:image xlink:href="Pictures/10000001000002CB000002254F01D463.png" xlink:type="simple" xlink:show="embed" xlink:actuate="onLoad" draw:mime-type="image/png"/></draw:frame></text:p>
      <text:p text:style-name="P9"/>
      <text:p text:style-name="P8"/>
      <text:p text:style-name="P8">Ocultamiento de Datos Sensibles: <text:span text:style-name="T1">Al consultar no muestra información de Password</text:span></text:p>
      <text:p text:style-name="P8"/>
      <text:p text:style-name="P8"><draw:frame draw:style-name="fr4" draw:name="Imagen6" text:anchor-type="char" svg:width="17cm" svg:height="13.936cm" draw:z-index="5"><draw:image xlink:href="Pictures/10000001000002D70000025403EFE0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20:06:35.450806355</meta:creation-date>
    <dc:date>2026-05-27T23:36:43.148000437</dc:date>
    <meta:editing-duration>PT3H22M34S</meta:editing-duration>
    <meta:editing-cycles>8</meta:editing-cycles>
    <meta:generator>LibreOffice/25.8.7.3$Linux_X86_64 LibreOffice_project/580$Build-3</meta:generator>
    <meta:document-statistic meta:table-count="0" meta:image-count="6" meta:object-count="0" meta:page-count="6" meta:paragraph-count="8" meta:word-count="44" meta:character-count="320" meta:non-whitespace-character-count="284"/>
  </office:meta>
</office:document-meta>
</file>